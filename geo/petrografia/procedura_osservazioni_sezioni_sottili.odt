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officeooo:rsid="000f4e59" officeooo:paragraph-rsid="0013bd8a"/>
    </style:style>
    <style:style style:name="P2" style:family="paragraph" style:parent-style-name="Standard">
      <style:paragraph-properties fo:text-align="center" style:justify-single-word="false"/>
      <style:text-properties style:font-name="Liberation Mono" officeooo:rsid="000f4e59" officeooo:paragraph-rsid="000f4e59"/>
    </style:style>
    <style:style style:name="P3" style:family="paragraph" style:parent-style-name="Standard">
      <style:text-properties style:font-name="Liberation Mono" officeooo:rsid="000f4e59" officeooo:paragraph-rsid="000f4e59"/>
    </style:style>
    <style:style style:name="P4" style:family="paragraph" style:parent-style-name="Standard">
      <style:text-properties style:font-name="Liberation Mono" officeooo:rsid="000f4e59" officeooo:paragraph-rsid="0017cb1b"/>
    </style:style>
    <style:style style:name="P5" style:family="paragraph" style:parent-style-name="Standard">
      <style:text-properties style:font-name="Liberation Mono" officeooo:rsid="000f4e59" officeooo:paragraph-rsid="00190e22"/>
    </style:style>
    <style:style style:name="P6" style:family="paragraph" style:parent-style-name="Standard">
      <style:paragraph-properties fo:text-align="center" style:justify-single-word="false"/>
      <style:text-properties style:font-name="Liberation Mono" officeooo:rsid="0016e2a3" officeooo:paragraph-rsid="0016e2a3"/>
    </style:style>
    <style:style style:name="P7" style:family="paragraph" style:parent-style-name="Standard">
      <style:paragraph-properties fo:text-align="center" style:justify-single-word="false" fo:break-before="page"/>
      <style:text-properties style:font-name="Liberation Mono" style:text-underline-style="solid" style:text-underline-width="auto" style:text-underline-color="font-color" officeooo:rsid="0016e2a3" officeooo:paragraph-rsid="0016e2a3"/>
    </style:style>
    <style:style style:name="P8" style:family="paragraph" style:parent-style-name="Footer">
      <style:paragraph-properties fo:text-align="center" style:justify-single-word="false"/>
      <style:text-properties officeooo:paragraph-rsid="001506fb"/>
    </style:style>
    <style:style style:name="P9" style:family="paragraph" style:parent-style-name="Standard">
      <style:text-properties style:font-name="Liberation Mono" officeooo:rsid="000f4e59" officeooo:paragraph-rsid="0017cb1b"/>
    </style:style>
    <style:style style:name="P10" style:family="paragraph" style:parent-style-name="Standard">
      <style:text-properties style:font-name="Liberation Mono" officeooo:rsid="000f4e59" officeooo:paragraph-rsid="001bd8a0"/>
    </style:style>
    <style:style style:name="P11" style:family="paragraph" style:parent-style-name="Standard">
      <style:text-properties style:font-name="Liberation Mono" officeooo:rsid="000f4e59" officeooo:paragraph-rsid="000f4e59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Liberation Mono" style:text-underline-style="solid" style:text-underline-width="auto" style:text-underline-color="font-color" officeooo:rsid="001cda57" officeooo:paragraph-rsid="001cda57"/>
    </style:style>
    <style:style style:name="P13" style:family="paragraph" style:parent-style-name="Standard">
      <style:paragraph-properties fo:text-align="start" style:justify-single-word="false"/>
      <style:text-properties style:font-name="Liberation Mono" style:text-underline-style="none" officeooo:rsid="001cda57" officeooo:paragraph-rsid="001e41bf"/>
    </style:style>
    <style:style style:name="P14" style:family="paragraph" style:parent-style-name="Standard">
      <style:paragraph-properties fo:text-align="start" style:justify-single-word="false"/>
      <style:text-properties style:font-name="Liberation Mono" style:text-underline-style="none" officeooo:rsid="001e41bf" officeooo:paragraph-rsid="001e41bf"/>
    </style:style>
    <style:style style:name="T1" style:family="text">
      <style:text-properties style:font-name="Liberation Mono" officeooo:rsid="000f4e59"/>
    </style:style>
    <style:style style:name="T2" style:family="text">
      <style:text-properties officeooo:rsid="0017cb1b"/>
    </style:style>
    <style:style style:name="T3" style:family="text">
      <style:text-properties officeooo:rsid="00190e22"/>
    </style:style>
    <style:style style:name="T4" style:family="text">
      <style:text-properties officeooo:rsid="0019e2a1"/>
    </style:style>
    <style:style style:name="T5" style:family="text">
      <style:text-properties officeooo:rsid="001a26c3"/>
    </style:style>
    <style:style style:name="T6" style:family="text">
      <style:text-properties officeooo:rsid="001b1d5c"/>
    </style:style>
    <style:style style:name="T7" style:family="text">
      <style:text-properties officeooo:rsid="001bd8a0"/>
    </style:style>
    <style:style style:name="T8" style:family="text">
      <style:text-properties officeooo:rsid="001e41bf"/>
    </style:style>
    <style:style style:name="T9" style:family="text">
      <style:text-properties officeooo:rsid="000f4e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dura osservazioni minerali e rocce in sezione sottile</text:p>
      <text:p text:style-name="P3"/>
      <text:p text:style-name="P3">Osservazione a occhio nudo</text:p>
      <text:p text:style-name="P3"><text:s text:c="4"/>* sono presenti minerali scuri?</text:p>
      <text:p text:style-name="P3"><text:s text:c="4"/>* se sì, in che proporzione (areale)?</text:p>
      <text:p text:style-name="P3"/>
      <text:p text:style-name="P6"/>
      <text:p text:style-name="P7">POL: OSSERVAZIONI RILIEVO</text:p>
      <text:p text:style-name="P3">Legenda</text:p>
      <text:p text:style-name="P3"><text:s text:c="8"/>C = collante</text:p>
      <text:p text:style-name="P3"><text:s text:c="8"/>M = minerale</text:p>
      <text:p text:style-name="P3"><text:s text:c="3"/>M1, M2 = minerale 1, minerale 2</text:p>
      <text:p text:style-name="P3"><text:s text:c="7"/>nC = indice di rifrazione del collante</text:p>
      <text:p text:style-name="P3"><text:s text:c="7"/>nM = indice di rifrazione del minerale</text:p>
      <text:p text:style-name="P3"><text:s text:c="3"/>n1, n2 = indice di rifrazione del minerale 1, del minerale 2</text:p>
      <text:p text:style-name="P3"/>
      <text:p text:style-name="P3">È noto l'indice di rifrazione di C?</text:p>
      <text:p text:style-name="P3"><text:s text:c="3"/>Balsamo del Canada [ ] ~1.54</text:p>
      <text:p text:style-name="P3"><text:s text:c="4"/>Resina epossidica [ ] ~1.56</text:p>
      <text:p text:style-name="P3"><text:s text:c="3"/>__________________ [ ]</text:p>
      <text:p text:style-name="P3"/>
      <text:p text:style-name="P3">pol - Rilievo</text:p>
      <text:p text:style-name="P3"><text:s text:c="3"/>Tra M e C [ ] oppure tra M1 e M2 [ ]</text:p>
      <text:p text:style-name="P3"><text:s text:c="3"/>Alto [ ] medio [ ] basso [ ]</text:p>
      <text:p text:style-name="P3"/>
      <text:p text:style-name="P3">pol - Linea di Becke</text:p>
      <text:p text:style-name="P3"><text:s text:c="3"/>Tra M e C [ ] </text:p>
      <text:p text:style-name="P3"><text:s text:c="6"/>Allontanando il piatto la linea </text:p>
      <text:p text:style-name="P3"><text:s text:c="9"/>entra in M [ ] ⇒ nM &gt; nC</text:p>
      <text:p text:style-name="P3"><text:s text:c="9"/>entra in C [ ] ⇒ nC &gt; nM</text:p>
      <text:p text:style-name="P3"><text:s text:c="6"/>Avvicinando il piatto la linea </text:p>
      <text:p text:style-name="P3"><text:s text:c="9"/>entra in M [ ] ⇒ nM &lt; nC</text:p>
      <text:p text:style-name="P3"><text:s text:c="9"/>entra in C [ ] ⇒ nC &lt; nM</text:p>
      <text:p text:style-name="P3"/>
      <text:p text:style-name="P3"><text:s text:c="3"/>Tra M1 e M2 [ ]</text:p>
      <text:p text:style-name="P3"><text:s text:c="6"/>Allontanando il piatto la linea </text:p>
      <text:p text:style-name="P3"><text:s text:c="9"/>entra in M1 [ ] ⇒ n1 &gt; n2</text:p>
      <text:p text:style-name="P3"><text:s text:c="9"/>entra in M2 [ ] ⇒ n2 &gt; n1</text:p>
      <text:p text:style-name="P3"><text:s text:c="6"/>Avvicinando il piatto la linea </text:p>
      <text:p text:style-name="P3"><text:s text:c="9"/>entra in M1 [ ] ⇒ n1 &lt; n2</text:p>
      <text:p text:style-name="P3"><text:s text:c="9"/>entra in M2 [ ] ⇒ n2 &lt; n1</text:p>
      <text:p text:style-name="P3"/>
      <text:p text:style-name="P7">POL: OSSERVAZIONI COLORE</text:p>
      <text:p text:style-name="P3">pol - Assorbimento</text:p>
      <text:p text:style-name="P3"><text:s text:c="3"/>Opaco [ ] Trasparente incolore [ ] </text:p>
      <text:p text:style-name="P3"><text:s text:c="13"/>Trasparente colorato [ ]</text:p>
      <text:p text:style-name="P3"><text:s text:c="26"/>Torbido [ ]</text:p>
      <text:p text:style-name="P3"/>
      <text:p text:style-name="P3">pol - Colore</text:p>
      <text:p text:style-name="P3"><text:s text:c="3"/>Ruotando il piatto il colore</text:p>
      <text:p text:style-name="P4"><text:s text:c="5"/>Non cambia [ ] ⇒ il minerale è isotropo</text:p>
      <text:p text:style-name="P4"><text:s text:c="20"/>⇒ <text:span text:style-name="T2">il colore è __________________________</text:span><text:span text:style-name="T3">_____</text:span></text:p>
      <text:p text:style-name="P4"/>
      <text:p text:style-name="P4"><text:s text:c="5"/>Pleocroico [ ] ⇒ il minerale è <text:span text:style-name="T2">an</text:span>isotropo</text:p>
      <text:p text:style-name="P10"><text:s text:c="20"/>⇒ il minerale <text:span text:style-name="T7">non appartiene sistema cubico</text:span></text:p>
      <text:p text:style-name="P5"><text:s text:c="20"/>⇒ <text:span text:style-name="T2">il </text:span><text:span text:style-name="T3">1° colore</text:span><text:span text:style-name="T2"> è ____________________</text:span><text:span text:style-name="T3">________</text:span></text:p>
      <text:p text:style-name="P5"><text:s text:c="20"/>⇒ <text:span text:style-name="T2">il </text:span><text:span text:style-name="T3">2° colore</text:span><text:span text:style-name="T2"> è ____________________</text:span><text:span text:style-name="T3">________</text:span></text:p>
      <text:p text:style-name="P3"/>
      <text:p text:style-name="P3">pol – Colori <text:span text:style-name="T4">(Schmidt 2023)</text:span></text:p>
      <text:p text:style-name="P3"><text:s text:c="3"/><text:span text:style-name="T6">i</text:span>ncolore, <text:span text:style-name="T5">v</text:span>erde, <text:span text:style-name="T5">m</text:span>arrone, <text:span text:style-name="T5">b</text:span>lu, <text:span text:style-name="T5">r</text:span>osso/<text:span text:style-name="T4">rosa</text:span></text:p>
      <text:p text:style-name="P3"/>
      <text:p text:style-name="P12">ABITO</text:p>
      <text:p text:style-name="P13"><text:span text:style-name="T8">Rettangoli allungati </text:span><text:span text:style-name="T9">⇒ </text:span>Prismatico</text:p>
      <text:p text:style-name="P14">Esagono <text:span text:style-name="T9">⇒ </text:span>Cubic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beration Mono" officeooo:rsid="000f4e59" officeooo:paragraph-rsid="0013bd8a"/>
    </style:style>
    <style:style style:name="MP2" style:family="paragraph" style:parent-style-name="Footer">
      <style:paragraph-properties fo:text-align="center" style:justify-single-word="false"/>
      <style:text-properties officeooo:paragraph-rsid="001506fb"/>
    </style:style>
    <style:style style:name="MT1" style:family="text">
      <style:text-properties style:font-name="Liberation Mono" officeooo:rsid="000f4e5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SCHEDA OSSERVAZIONI AL MICROSCOPIO POLARIZZATORE </text:span><text:bookmark-start text:name="PageNumWizard_FOOTER_Default Page Style1 Copy 1"/><text:page-number text:select-page="current">2</text:page-number><text:s/>/ <text:page-count>4</text:page-count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13:00:04.154043863</meta:creation-date>
    <meta:generator>LibreOffice/24.2.7.2$Linux_X86_64 LibreOffice_project/420$Build-2</meta:generator>
    <dc:date>2026-04-26T14:56:34.748584416</dc:date>
    <meta:editing-duration>PT1H11M19S</meta:editing-duration>
    <meta:editing-cycles>13</meta:editing-cycles>
    <meta:document-statistic meta:table-count="0" meta:image-count="0" meta:object-count="0" meta:page-count="4" meta:paragraph-count="53" meta:word-count="316" meta:character-count="1821" meta:non-whitespace-character-count="1251"/>
  </office:meta>
</office:document-meta>
</file>